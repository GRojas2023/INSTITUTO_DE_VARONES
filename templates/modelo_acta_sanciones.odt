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paragraph-rsid="00125a34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paragraph-rsid="00164227" style:font-size-asian="12pt" style:font-size-complex="12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loext:word-spacing-minimum="75%" loext:word-spacing-maximum="133%"/>
      <style:text-properties style:font-name="Arial" fo:font-size="12pt" officeooo:paragraph-rsid="001466a2" style:font-size-asian="12pt" style:font-size-complex="12pt"/>
    </style:style>
    <style:style style:name="P6" style:family="paragraph" style:parent-style-name="Standard">
      <style:paragraph-properties fo:text-align="justify" style:justify-single-word="false" loext:word-spacing-minimum="75%" loext:word-spacing-maximum="133%"/>
      <style:text-properties style:font-name="Arial" fo:font-size="12pt" officeooo:paragraph-rsid="00162698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size="12pt" officeooo:paragraph-rsid="00164227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size="12pt" fo:language="es" fo:country="ES" fo:font-weight="bold" officeooo:paragraph-rsid="00164227" style:font-size-asian="12pt" style:language-asian="es" style:country-asian="ES" style:font-weight-asian="bold" style:font-name-complex="Arial1" style:font-size-complex="12pt" style:font-weight-complex="bold"/>
    </style:style>
    <style:style style:name="P9" style:family="paragraph" style:parent-style-name="Standard">
      <style:text-properties style:font-name="Arial" fo:font-size="12pt" fo:background-color="#ffffff" style:font-size-asian="12pt" style:language-asian="es" style:country-asian="ES" style:font-name-complex="Arial1" style:font-size-complex="12pt"/>
    </style:style>
    <style:style style:name="P10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2" style:family="paragraph" style:parent-style-name="Frame_20_contents">
      <style:paragraph-properties fo:margin-top="0cm" fo:margin-bottom="0cm" style:contextual-spacing="false" fo:text-align="center" style:justify-single-word="false"/>
    </style:style>
    <style:style style:name="P13" style:family="paragraph">
      <loext:graphic-properties draw:fill="solid" draw:fill-color="#ffffff"/>
      <style:paragraph-properties fo:text-align="left"/>
      <style:text-properties fo:font-size="18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Arial" fo:font-size="12pt" officeooo:paragraph-rsid="00164227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Arial" fo:font-size="12pt" fo:language="es" fo:country="ES" officeooo:paragraph-rsid="00164227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size="12pt" fo:language="es" fo:country="ES" style:font-name-asian="Times New Roman1" style:font-size-asian="12pt" style:language-asian="es" style:country-asian="ES" style:font-name-complex="Arial1" style:font-size-complex="12pt"/>
    </style:style>
    <style:style style:name="P18" style:family="paragraph" style:parent-style-name="Standard">
      <style:paragraph-properties fo:line-height="100%" fo:text-align="justify" style:justify-single-word="false" loext:word-spacing-minimum="75%" loext:word-spacing-maximum="133%"/>
      <style:text-properties style:font-name="Arial" fo:font-size="12pt" fo:language="es" fo:country="ES" style:font-size-asian="12pt" style:language-asian="es" style:country-asian="ES" style:font-size-complex="12pt"/>
    </style:style>
    <style:style style:name="P19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paragraph-rsid="0017d86f"/>
    </style:style>
    <style:style style:name="P21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Arial" fo:font-size="12pt" style:font-size-asian="12pt" style:font-size-complex="12pt"/>
    </style:style>
    <style:style style:name="P23" style:family="paragraph" style:parent-style-name="Standard">
      <style:text-properties fo:color="#ff0000" loext:opacity="100%" style:font-name="Arial" fo:font-size="12pt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language="es" fo:country="ES" fo:font-weight="bold" style:language-asian="es" style:country-asian="ES" style:font-weight-asian="bold" style:font-name-complex="Arial1" style:font-weight-complex="bold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language="es" fo:country="ES" fo:font-weight="bold" officeooo:rsid="00125a34" style:language-asian="es" style:country-asian="ES" style:font-weight-asian="bold" style:font-name-complex="Arial1" style:font-weight-complex="bold"/>
    </style:style>
    <style:style style:name="T4" style:family="text">
      <style:text-properties fo:color="#212529" loext:opacity="100%" fo:font-weight="bold" style:font-weight-asian="bold" style:font-name-complex="Arial1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style:font-name-asian="Times New Roman1" style:language-asian="es" style:country-asian="AR" style:font-weight-asian="bold" style:font-name-complex="Arial1" style:font-weight-complex="bold"/>
    </style:style>
    <style:style style:name="T7" style:family="text">
      <style:text-properties fo:color="#212529" loext:opacity="100%" fo:font-weight="bold" style:font-weight-asian="bold" style:font-weight-complex="bold"/>
    </style:style>
    <style:style style:name="T8" style:family="text">
      <style:text-properties fo:language="es" fo:country="ES" fo:font-weight="bold" style:font-name-asian="Times New Roman1" style:language-asian="es" style:country-asian="ES" style:font-weight-asian="bold" style:font-name-complex="Arial1" style:font-weight-complex="bold"/>
    </style:style>
    <style:style style:name="T9" style:family="text">
      <style:text-properties fo:font-variant="normal" fo:text-transform="none" fo:language="es" fo:country="ES" fo:font-style="normal" fo:font-weight="bold" style:font-name-asian="Times New Roman1" style:language-asian="es" style:country-asian="ES" style:font-weight-asian="bold" style:font-name-complex="Arial1"/>
    </style:style>
    <style:style style:name="T10" style:family="text">
      <style:text-properties fo:language="es" fo:country="ES" fo:font-weight="bold" officeooo:rsid="00125a34" style:font-name-asian="Times New Roman1" style:language-asian="es" style:country-asian="ES" style:font-weight-asian="bold" style:font-name-complex="Arial1" style:font-weight-complex="bold"/>
    </style:style>
    <style:style style:name="T11" style:family="text">
      <style:text-properties fo:color="#ff0000" loext:opacity="100%" fo:font-weight="bold" style:language-asian="es" style:country-asian="ES" style:font-weight-asian="bold" style:font-name-complex="Arial1"/>
    </style:style>
    <style:style style:name="T12" style:family="text">
      <style:text-properties fo:color="#ff0000" loext:opacity="100%" fo:font-weight="bold" officeooo:rsid="00164227" style:language-asian="es" style:country-asian="ES" style:font-weight-asian="bold" style:font-name-complex="Arial1"/>
    </style:style>
    <style:style style:name="T13" style:family="text">
      <style:text-properties fo:font-weight="bold" style:language-asian="es" style:country-asian="ES" style:font-weight-asian="bold" style:font-name-complex="Arial1"/>
    </style:style>
    <style:style style:name="T14" style:family="text">
      <style:text-properties style:language-asian="es" style:country-asian="ES" style:font-name-complex="Arial1"/>
    </style:style>
    <style:style style:name="T15" style:family="text">
      <style:text-properties officeooo:rsid="00125a34" style:language-asian="es" style:country-asian="ES" style:font-name-complex="Arial1"/>
    </style:style>
    <style:style style:name="T16" style:family="text">
      <style:text-properties fo:color="#ff0000" loext:opacity="100%" style:language-asian="es" style:country-asian="ES" style:font-name-complex="Arial1"/>
    </style:style>
    <style:style style:name="T17" style:family="text">
      <style:text-properties fo:color="#ff0000" loext:opacity="100%" style:font-name-complex="Arial1"/>
    </style:style>
    <style:style style:name="T18" style:family="text">
      <style:text-properties fo:font-weight="bold" style:language-asian="es" style:country-asian="ES" style:font-weight-asian="bold" style:font-name-complex="Arial1" style:font-weight-complex="bold"/>
    </style:style>
    <style:style style:name="T19" style:family="text">
      <style:text-properties fo:font-variant="normal" fo:text-transform="none" fo:font-style="normal" fo:font-weight="bold" style:language-asian="es" style:country-asian="ES" style:font-weight-asian="bold" style:font-name-complex="Arial1" style:font-weight-complex="bold"/>
    </style:style>
    <style:style style:name="T20" style:family="text">
      <style:text-properties fo:color="#212529" loext:opacity="100%" fo:font-weight="bold" style:language-asian="es" style:country-asian="ES" style:font-weight-asian="bold" style:font-name-complex="Arial1" style:font-weight-complex="bold"/>
    </style:style>
    <style:style style:name="T21" style:family="text">
      <style:text-properties style:font-name-complex="Arial1"/>
    </style:style>
    <style:style style:name="T22" style:family="text">
      <style:text-properties style:language-asian="es" style:country-asian="ES" style:font-name-complex="Arial1" style:font-weight-complex="bold"/>
    </style:style>
    <style:style style:name="T23" style:family="text">
      <style:text-properties style:font-name-asian="Times New Roman1" style:language-asian="es" style:country-asian="ES" style:font-name-complex="Arial1"/>
    </style:style>
    <style:style style:name="T24" style:family="text">
      <style:text-properties fo:language="es" fo:country="ES" style:font-name-asian="Times New Roman1" style:language-asian="es" style:country-asian="ES" style:font-name-complex="Arial1"/>
    </style:style>
    <style:style style:name="T25" style:family="text">
      <style:text-properties fo:language="es" fo:country="ES" officeooo:rsid="001466a2" style:font-name-asian="Times New Roman1" style:language-asian="es" style:country-asian="ES" style:font-name-complex="Arial1"/>
    </style:style>
    <style:style style:name="T26" style:family="text">
      <style:text-properties fo:language="es" fo:country="ES" fo:font-weight="bold" style:font-weight-asian="bold" style:font-name-complex="Arial1" style:font-weight-complex="bold"/>
    </style:style>
    <style:style style:name="T27" style:family="text">
      <style:text-properties fo:language="es" fo:country="ES" style:font-name-complex="Arial1"/>
    </style:style>
    <style:style style:name="T28" style:family="text">
      <style:text-properties fo:color="#ee0000" loext:opacity="100%" style:font-name-complex="Arial1"/>
    </style:style>
    <style:style style:name="T29" style:family="text">
      <style:text-properties fo:background-color="#ffffff" loext:char-shading-value="0" style:language-asian="es" style:country-asian="ES" style:font-name-complex="Arial1"/>
    </style:style>
    <style:style style:name="T30" style:family="text">
      <style:text-properties officeooo:rsid="00162698" style:language-asian="es" style:country-asian="ES" style:font-name-complex="Arial1"/>
    </style:style>
    <style:style style:name="T31" style:family="text">
      <style:text-properties fo:color="#ff0000" loext:opacity="100%" officeooo:rsid="00162698" style:language-asian="es" style:country-asian="ES" style:font-name-complex="Arial1"/>
    </style:style>
    <style:style style:name="T32" style:family="text">
      <style:text-properties style:font-name="Times New Roman" fo:font-size="9pt" style:font-size-asian="9pt" style:font-size-complex="9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style:font-name="Times New Roman" fo:font-size="10pt" style:font-size-asian="10pt" style:font-size-complex="10p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language="es" fo:country="ES" style:language-asian="es" style:country-asian="ES" style:font-name-complex="Arial1"/>
    </style:style>
    <style:style style:name="T37" style:family="text">
      <style:text-properties fo:language="es" fo:country="ES" officeooo:rsid="00164227" style:language-asian="es" style:country-asian="ES" style:font-name-complex="Arial1"/>
    </style:style>
    <style:style style:name="T38" style:family="text">
      <style:text-properties fo:font-variant="normal" fo:text-transform="none" fo:language="es" fo:country="ES" fo:font-style="normal" fo:font-weight="bold" style:language-asian="es" style:country-asian="ES" style:font-weight-asian="bold" style:font-name-complex="Arial1" style:font-weight-complex="bold"/>
    </style:style>
    <style:style style:name="T39" style:family="text">
      <style:text-properties fo:language="es" fo:country="ES" fo:font-weight="bold" style:font-name-asian="Times New Roman1" style:language-asian="es" style:country-asian="AR" style:font-weight-asian="bold" style:font-name-complex="Arial1" style:font-weight-complex="bold"/>
    </style:style>
    <style:style style:name="T40" style:family="text">
      <style:text-properties fo:color="#212529" loext:opacity="100%" fo:language="es" fo:country="ES" fo:font-weight="bold" style:language-asian="es" style:country-asian="ES" style:font-weight-asian="bold" style:font-name-complex="Arial1" style:font-weight-complex="bold"/>
    </style:style>
    <style:style style:name="T41" style:family="text">
      <style:text-properties fo:color="#ff0000" loext:opacity="100%" fo:language="es" fo:country="ES" style:language-asian="es" style:country-asian="ES" style:font-name-complex="Arial1"/>
    </style:style>
    <style:style style:name="T42" style:family="text">
      <style:text-properties style:font-name="Arial" fo:font-size="9pt" style:font-size-asian="9pt" style:font-name-complex="Arial1" style:font-size-complex="9pt"/>
    </style:style>
    <style:style style:name="T43" style:family="text">
      <style:text-properties style:font-name="Times New Roman" fo:font-size="10pt" officeooo:rsid="00164227" style:font-size-asian="10pt" style:font-size-complex="10pt"/>
    </style:style>
    <style:style style:name="T44" style:family="text">
      <style:text-properties style:font-name="Times New Roman" fo:font-size="10pt" officeooo:rsid="0017d86f" style:font-size-asian="10pt" style:font-size-complex="10pt"/>
    </style:style>
    <style:style style:name="T45" style:family="text">
      <style:text-properties fo:font-variant="normal" fo:text-transform="none" fo:color="#1f1f1f" loext:opacity="100%" fo:font-family="'Google Sans', Roboto, RobotoDraft, Helvetica, Arial, sans-serif" fo:font-size="10.5pt" fo:letter-spacing="normal" fo:font-style="normal" fo:font-weight="bold"/>
    </style:style>
    <style:style style:name="T46" style:family="text">
      <style:text-properties fo:language="es" fo:country="ES" style:language-asian="es" style:country-asian="ES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.958cm" fo:min-width="6.55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679cm" fo:min-width="8.37cm" fo:padding-top="0.127cm" fo:padding-bottom="0.127cm" fo:padding-left="0.254cm" fo:padding-right="0.254cm" fo:wrap-option="wrap" loext:decorative="false" fo:margin-left="0cm" fo:margin-right="0.014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A N° <text:s text:c="2"/>«</text:span><text:span text:style-name="T2">ACTA N°</text:span><text:span text:style-name="T3">»</text:span><text:span text:style-name="T1"> <text:s/>/ «</text:span><text:span text:style-name="T3">año actual»</text:span><text:span text:style-name="T1"> C.C. - Sanción Disciplinaria</text:span><text:span text:style-name="T4"> /</text:span><text:span text:style-name="T5"> Interno «</text:span><text:span text:style-name="T2">INTERNO</text:span><text:span text:style-name="T5">»</text:span><text:span text:style-name="T6"> </text:span><text:span text:style-name="T5">(L.P.U.</text:span><text:span text:style-name="T7"> «</text:span><text:span text:style-name="T2">LPU</text:span> <text:span text:style-name="T7">»</text:span><text:span text:style-name="T5">)</text:span></text:p>
      <text:p text:style-name="P2"/>
      <text:p text:style-name="P3"><text:span text:style-name="T8">«</text:span><text:span text:style-name="T9">ACTA N°</text:span><text:span text:style-name="T10">»</text:span><text:span text:style-name="T8"> <text:s/>/ «</text:span><text:span text:style-name="T10">año actual»</text:span><text:span text:style-name="T8"> C.C.</text:span></text:p>
      <text:p text:style-name="P4"><text:span text:style-name="T11">CONSEJO CORRECCIONAL / </text:span><text:span text:style-name="T12">CENTRO DE EVALUACIÓN DE INTERNOS PROCESADOS</text:span><text:span text:style-name="T13"> DEL INSTITUTO FEDERAL DE VARONES - C.P.F. III – NOA</text:span></text:p>
      <text:p text:style-name="P5"><text:span text:style-name="T14">En el Instituto Federal de Varones del Complejo Penitenciario Federal III “Centro Federal Noroeste Argentino” dependiente del Servicio Penitenciario Federal a los «</text:span><text:span text:style-name="T15">fecha actual en el formato “20 dias del Julio del año 2026”</text:span><text:span text:style-name="T14">», se procede a labrar la presente al sólo efecto de dejar constancia de la reunión efectuada por el </text:span><text:span text:style-name="T16">Consejo Correccional, presidida por el señor Director del Instituto Alcaide Mayor Diego E TURIANO </text:span><text:span text:style-name="T17">e integrada por los Jefes de cada una de las áreas relativas a la aplicación del tratamiento penitenciario y/o sus representantes directos, actuando como </text:span><text:span text:style-name="T17">Secretario Adjutor Ppal Lic Sergio GARCIA</text:span><text:span text:style-name="T14">; a fin de tratar la </text:span><text:span text:style-name="T18">SANCIÓN DISCIPLINARIA</text:span><text:span text:style-name="T14"> tramita por expediente electrónico </text:span><text:span text:style-name="T15">N.º «</text:span><text:span text:style-name="T2">EXPEDIENTE</text:span><text:span text:style-name="T15">»</text:span><text:span text:style-name="T14"> impuesta al interno </text:span><text:span text:style-name="T18">«</text:span><text:span text:style-name="T19">INTERNO</text:span><text:span text:style-name="T18">»</text:span><text:span text:style-name="T6"> </text:span><text:span text:style-name="T18">(L.P.U.</text:span><text:span text:style-name="T20"> «</text:span><text:span text:style-name="T19">LPU</text:span><text:span text:style-name="T20">»</text:span><text:span text:style-name="T18">)</text:span><text:span text:style-name="T21"> </text:span><text:span text:style-name="T14">a raíz de los hechos ocurridos el día «</text:span><text:span text:style-name="T2">FECHA DEL HECHO</text:span><text:span text:style-name="T14">»:</text:span><text:span text:style-name="T16"> </text:span><text:span text:style-name="T14">“</text:span><text:span text:style-name="T18">«</text:span><text:span text:style-name="T2">DESCRIPCION DEL HECHO</text:span> <text:span text:style-name="T18">»</text:span><text:span text:style-name="T14">”; <text:s/>transgrediendo de esta forma <text:s/>el «</text:span><text:span text:style-name="T2">ARTICULOS</text:span><text:span text:style-name="T14">»</text:span><text:span text:style-name="T22">;</text:span><text:span text:style-name="T14"> Infracciones tipificadas como </text:span><text:span text:style-name="T18">«</text:span><text:span text:style-name="T2">TIPO</text:span><text:span text:style-name="T18">»</text:span><text:span text:style-name="T14">, respectivamente. Por las mismas, mediante Orden Interna «</text:span><text:span text:style-name="T2">ORDEN INTERNA</text:span><text:span text:style-name="T14">»</text:span><text:span text:style-name="T23"> </text:span><text:span text:style-name="T14">de fecha </text:span><text:span text:style-name="T23">«</text:span><text:span text:style-name="T2">FECHA ORDEN INTERNA</text:span><text:span text:style-name="T23">»</text:span><text:span text:style-name="T14">, se le impuso el correctivo disciplinario contemplado en el «</text:span><text:span text:style-name="T2">SANCION</text:span><text:span text:style-name="T14">» del decreto 18/97.</text:span></text:p>
      <text:p text:style-name="P6"><text:span text:style-name="T24">Según lo informado por l</text:span><text:span text:style-name="T25">a División </text:span><text:span text:style-name="T24">Servicio Criminológico, e</text:span><text:span text:style-name="T23">l interno que nos ocupa registra actualmente guarismo de </text:span><text:span text:style-name="T26">CONDUCTA «</text:span><text:span text:style-name="T2">CONDUCTA INICIO</text:span> <text:span text:style-name="T26">» y Concepto «</text:span><text:span text:style-name="T2">CONCEPTO INICIO</text:span> <text:span text:style-name="T26">» </text:span><text:span text:style-name="T27">Transita la fase de «</text:span><text:span text:style-name="T2">FASE INICIO</text:span> <text:span text:style-name="T27">»</text:span><text:span text:style-name="T28">.</text:span></text:p>
      <text:p text:style-name="P7"><text:span text:style-name="T29">-</text:span><text:span text:style-name="T14"> Previo a ponderar la falta, las circunstancias y la personalidad de la P</text:span><text:span text:style-name="T30">ersona </text:span><text:span text:style-name="T14">P</text:span><text:span text:style-name="T30">rivada de </text:span><text:span text:style-name="T14">L</text:span><text:span text:style-name="T30">ibertad</text:span><text:span text:style-name="T14"> y en concordancia con lo establecido en el artículo 59 del decreto 396/99 (Reglamento de Modalidades Básicas de Ejecución), los integrantes del </text:span><text:span text:style-name="T16">Consejo </text:span><text:span text:style-name="T31">C</text:span><text:span text:style-name="T16">orreccional,</text:span><text:span text:style-name="T14"> arriban a la CONCLUSIÓN, por consenso de criterios, de DISMINUIR «</text:span><text:span text:style-name="T2">CRITERIO CONDUCTA</text:span><text:span text:style-name="T14">» PUNTOS en el guarismo de CONDUCTA del interno </text:span><text:span text:style-name="T18">«</text:span><text:span text:style-name="T19">INTERNO</text:span><text:span text:style-name="T18">»</text:span><text:span text:style-name="T6"> </text:span><text:span text:style-name="T18">(L.P.U.</text:span><text:span text:style-name="T20"> «</text:span><text:span text:style-name="T19">LPU</text:span><text:span text:style-name="T20">»</text:span><text:span text:style-name="T18">)</text:span><text:span text:style-name="T21"> </text:span><text:span text:style-name="T14">quedando calificado en el día de la fecha con </text:span><text:span text:style-name="T26">Conducta «</text:span><text:span text:style-name="T2">CONDUCTA FINALIZA</text:span><text:span text:style-name="T26">» y Concepto «</text:span><text:span text:style-name="T2">CONCEPTO FINALIZA</text:span><text:span text:style-name="T26">». </text:span></text:p>
      <text:p text:style-name="P8"/>
      <text:p text:style-name="P7"><text:span text:style-name="T14">No siendo para más, se da por finalizada la presente firmando al pie los integrantes del Centro de Evaluación de Internos Procesados, para las debidas constancias</text:span><text:span text:style-name="T14">.</text:span></text:p>
      <text:p text:style-name="P9"/>
      <text:p text:style-name="P10"/>
      <text:p text:style-name="P10"/>
      <text:p text:style-name="P10"><text:soft-page-break/></text:p>
      <text:p text:style-name="P11"><text:span text:style-name="T35">ACTA DE NOTIFICACIÓN DE SANCIÓN</text:span></text:p>
      <text:p text:style-name="P14"><text:span text:style-name="T14">-----</text:span><text:span text:style-name="T36">En el C.P.F. III N.O.A., Instituto Federal de Varones, a los <text:s text:c="6"/>días del mes de «</text:span><text:span text:style-name="T37">mes actual»</text:span><text:span text:style-name="T36"> del año «</text:span><text:span text:style-name="T37">año actual</text:span><text:span text:style-name="T36">», se procede a notificar al interno </text:span><text:span text:style-name="T1">«</text:span><text:span text:style-name="T38">INTERNO</text:span><text:span text:style-name="T1">»</text:span><text:span text:style-name="T39"> </text:span><text:span text:style-name="T1">(L.P.U.</text:span><text:span text:style-name="T40"> «</text:span><text:span text:style-name="T38">LPU</text:span><text:span text:style-name="T40">»</text:span><text:span text:style-name="T1">),</text:span><text:span text:style-name="T21"> </text:span><text:span text:style-name="T36">de lo resuelto por el </text:span><text:span text:style-name="T41">Consejo Correccional</text:span><text:span text:style-name="T36"> mediante Acta Nº <text:s/>«</text:span><text:span text:style-name="T2">ACTA N°</text:span><text:span text:style-name="T36">» de fecha <text:s text:c="2"/></text:span><text:span text:style-name="T41">20/05/2026</text:span><text:span text:style-name="T36">, por falta disciplinaria «</text:span><text:span text:style-name="T2">TIPO</text:span><text:span text:style-name="T36">» tramitada </text:span><text:span text:style-name="T37">mediante expediente «</text:span><text:span text:style-name="T2">EXPEDIENTE</text:span> <text:span text:style-name="T37">»</text:span><text:span text:style-name="T36"> </text:span><text:span text:style-name="T37">por echo ocurrido en </text:span><text:span text:style-name="T36">fecha «</text:span><text:span text:style-name="T2">FECHA DEL HECHO</text:span> <text:span text:style-name="T36">», </text:span><text:span text:style-name="T37">donde se le atribuye </text:span><text:span text:style-name="T36">el cargo de “</text:span><text:span text:style-name="T1">«</text:span><text:span text:style-name="T2">DESCRIPCION DEL HECHO</text:span><text:span text:style-name="T1">»</text:span><text:span text:style-name="T14">”. </text:span><text:span text:style-name="T36">Se dictaminó que por el hecho acaecido correspondería </text:span><text:span text:style-name="T14">DISMINUIR «</text:span><text:span text:style-name="T2">CRITERIO CONDUCTA</text:span><text:span text:style-name="T14">» PUNTOS en el guarismo de CONDUCTA del interno </text:span><text:span text:style-name="T18">«</text:span><text:span text:style-name="T19">INTERNO</text:span><text:span text:style-name="T18">»</text:span><text:span text:style-name="T6"> </text:span><text:span text:style-name="T18">(L.P.U.</text:span><text:span text:style-name="T20"> «</text:span><text:span text:style-name="T19">LPU</text:span><text:span text:style-name="T20">»</text:span><text:span text:style-name="T18">)</text:span><text:span text:style-name="T21"> </text:span><text:span text:style-name="T14">quedando calificado en el día de la fecha con </text:span><text:span text:style-name="T26">Conducta «</text:span><text:span text:style-name="T2">CONDUCTA FINALIZA</text:span><text:span text:style-name="T26">» y Concepto «</text:span><text:span text:style-name="T2">CONCEPTO FINALIZA</text:span><text:span text:style-name="T26">». </text:span><text:span text:style-name="T27">Se deja constancia que el próximo trimestre calificatorio se evaluará la disminución de su guarismo conceptual en virtud de los incidentes disciplinarios que anteceden.</text:span></text:p>
      <text:p text:style-name="P15"/>
      <text:p text:style-name="P16"><text:span text:style-name="T24">-----No siendo por más, se da por finalizado el acto, rubricando el interno junto al suscripto que certifica. -</text:span></text:p>
      <text:p text:style-name="P17"/>
      <text:p text:style-name="P18"><draw:custom-shape text:anchor-type="char" draw:z-index="3" draw:name="Cuadro de texto 17" draw:style-name="gr2" draw:text-style-name="P13" svg:width="8.877cm" svg:height="1.932cm" svg:x="8.324cm" svg:y="0.222cm"><text:p text:style-name="P19" loext:marker-style-name="T42">----------------------------------------</text:p><text:p text:style-name="P20" loext:marker-style-name="T42"><text:span text:style-name="T34">«</text:span><text:span text:style-name="T43">es el valor que existe en el rango D3 </text:span><text:span text:style-name="T44">de la hoja </text:span><text:span text:style-name="T45">Configuracion</text:span> <text:span text:style-name="T34">»</text:span></text:p><text:p text:style-name="P21" loext:marker-style-name="T42"><text:span text:style-name="T42">SECRETARIO DEL CONSEJO CORRECCIONAL</text:span></text:p><text:p text:style-name="P21" loext:marker-style-name="T33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text:span text:style-name="T46"><text:s text:c="5"/>--------------------------------------------------</text:span></text:p>
      <text:p text:style-name="P22"><text:span text:style-name="T46"><text:s text:c="30"/>INTERNO </text:span></text:p>
      <text:p text:style-name="P23"/>
      <text:p text:style-name="P24"/>
      <text:p text:style-name="P24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A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A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fo:font-size="11pt" style:letter-kerning="fals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line-height="116%" fo:keep-together="always" fo:keep-with-next="always"/>
      <style:text-properties fo:color="#0f4761" loext:opacity="100%" style:font-name="Aptos Display" fo:font-family="'Aptos Display'" style:font-family-generic="roman" style:font-pitch="variable" fo:font-size="20pt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line-height="116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letter-kerning="true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line-height="116%" fo:keep-together="always" fo:keep-with-next="always"/>
      <style:text-properties fo:color="#0f4761" loext:opacity="100%" fo:font-size="14pt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line-height="116%" fo:keep-together="always" fo:keep-with-next="always"/>
      <style:text-properties fo:color="#0f4761" loext:opacity="100%" fo:font-size="12pt" fo:font-style="italic" style:letter-kerning="tru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line-height="116%" fo:keep-together="always" fo:keep-with-next="always"/>
      <style:text-properties fo:color="#0f4761" loext:opacity="100%" fo:font-size="12pt" style:letter-kerning="true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line-height="116%" fo:keep-together="always" fo:keep-with-next="always"/>
      <style:text-properties fo:color="#595959" loext:opacity="100%" fo:font-size="12pt" fo:font-style="italic" style:letter-kerning="tru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line-height="116%" fo:keep-together="always" fo:keep-with-next="always"/>
      <style:text-properties fo:color="#595959" loext:opacity="100%" fo:font-size="12pt" style:letter-kerning="true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line-height="116%" fo:keep-together="always" fo:keep-with-next="always"/>
      <style:text-properties fo:color="#272727" loext:opacity="100%" fo:font-size="12pt" fo:font-style="italic" style:letter-kerning="tru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line-height="116%" fo:keep-together="always" fo:keep-with-next="always"/>
      <style:text-properties fo:color="#272727" loext:opacity="100%" fo:font-size="12pt" style:letter-kerning="true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.282cm" style:contextual-spacing="false" fo:line-height="116%"/>
      <style:text-properties fo:color="#595959" loext:opacity="100%" fo:font-size="14pt" fo:letter-spacing="0.026cm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line-height="116%" fo:text-align="center" style:justify-single-word="false"/>
      <style:text-properties fo:color="#404040" loext:opacity="100%" fo:font-size="12pt" fo:font-style="italic" style:letter-kerning="true" style:font-size-asian="12pt" style:font-style-asian="italic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16%"/>
      <style:text-properties fo:font-size="12pt" style:letter-kerning="true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line-height="116%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ize="12pt" fo:font-style="italic" style:letter-kerning="true" style:font-size-asian="12pt" style:font-style-asian="italic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nsejo_IFV</meta:initial-creator>
    <meta:editing-cycles>9</meta:editing-cycles>
    <meta:print-date>2026-05-11T16:15:00</meta:print-date>
    <meta:creation-date>2026-05-19T15:51:00</meta:creation-date>
    <dc:date>2026-07-01T11:07:16.464099700</dc:date>
    <meta:editing-duration>PT17M25S</meta:editing-duration>
    <meta:generator>LibreOffice/26.2.4.2$Windows_X86_64 LibreOffice_project/0229ac93fcf0d7cbc6376066c6f35021cef002dc</meta:generator>
    <meta:document-statistic meta:table-count="0" meta:image-count="0" meta:object-count="0" meta:page-count="2" meta:paragraph-count="26" meta:word-count="559" meta:character-count="3805" meta:non-whitespace-character-count="3212"/>
    <meta:user-defined meta:name="AppVersion">16.0000</meta:user-defined>
    <meta:template xlink:type="simple" xlink:actuate="onRequest" xlink:title="Normal" xlink:href=""/>
  </office:meta>
</office:document-meta>
</file>