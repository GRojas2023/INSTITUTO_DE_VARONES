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paragraph-rsid="001996bf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language="es" fo:country="ES" fo:font-weight="bold" officeooo:paragraph-rsid="001996bf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paragraph-rsid="001996bf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paragraph-rsid="001996b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paragraph-rsid="00162698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officeooo:paragraph-rsid="00164227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language="es" fo:country="ES" fo:font-weight="normal" officeooo:paragraph-rsid="00164227" style:font-size-asian="12pt" style:language-asian="es" style:country-asian="ES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normal" officeooo:paragraph-rsid="00164227" style:font-size-asian="12pt" style:language-asian="es" style:country-asian="ES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officeooo:paragraph-rsid="00164227" style:font-size-asian="12pt" style:language-asian="es" style:country-asian="ES" style:font-name-complex="Arial1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 loext:word-spacing-minimum="75%" loext:word-spacing-maximum="133%"/>
      <style:text-properties style:font-name="Arial" fo:font-size="12pt" officeooo:paragraph-rsid="00164227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 loext:word-spacing-minimum="75%" loext:word-spacing-maximum="133%"/>
      <style:text-properties style:font-name="Arial" fo:font-size="12pt" fo:language="es" fo:country="ES" officeooo:paragraph-rsid="00164227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 loext:word-spacing-minimum="75%" loext:word-spacing-maximum="133%"/>
      <style:text-properties style:font-name="Arial" fo:font-size="12pt" fo:language="es" fo:country="ES" style:font-name-asian="Times New Roman1" style:font-size-asian="12pt" style:language-asian="es" style:country-asian="ES" style:font-name-complex="Arial1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Arial" fo:font-size="12pt" fo:language="es" fo:country="ES" style:font-name-asian="Times New Roman1" style:font-size-asian="12pt" style:language-asian="es" style:country-asian="ES" style:font-name-complex="Arial1" style:font-size-complex="12pt"/>
    </style:style>
    <style:style style:name="P15" style:family="paragraph" style:parent-style-name="Standard">
      <style:paragraph-properties fo:line-height="100%" fo:text-align="justify" style:justify-single-word="false" loext:word-spacing-minimum="75%" loext:word-spacing-maximum="133%"/>
      <style:text-properties style:font-name="Arial" fo:font-size="12pt" fo:language="es" fo:country="ES" style:font-size-asian="12pt" style:language-asian="es" style:country-asian="ES" style:font-size-complex="12pt"/>
    </style:style>
    <style:style style:name="P16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0pt" style:font-size-asian="10pt" style:font-size-complex="10pt"/>
    </style:style>
    <style:style style:name="P17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officeooo:paragraph-rsid="0017d86f"/>
    </style:style>
    <style:style style:name="P18" style:family="paragraph" style:parent-style-name="Frame_20_contents">
      <style:paragraph-properties fo:margin-top="0cm" fo:margin-bottom="0cm" style:contextual-spacing="false" fo:line-height="100%" fo:text-align="center" style:justify-single-word="false"/>
    </style:style>
    <style:style style:name="P19" style:family="paragraph">
      <loext:graphic-properties draw:fill="solid" draw:fill-color="#ffffff"/>
      <style:paragraph-properties fo:text-align="left"/>
      <style:text-properties fo:font-size="18p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Arial" fo:font-size="12pt" fo:language="es" fo:country="ES" style:font-size-asian="12pt" style:language-asian="es" style:country-asian="ES" style:font-size-complex="12pt"/>
    </style:style>
    <style:style style:name="P21" style:family="paragraph" style:parent-style-name="Standard">
      <style:text-properties fo:color="#ff0000" loext:opacity="100%" style:font-name="Arial" fo:font-size="12pt" style:text-underline-style="solid" style:text-underline-width="auto" style:text-underline-color="font-color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T1" style:family="text">
      <style:text-properties fo:language="es" fo:country="ES" fo:font-weight="bold" style:language-asian="es" style:country-asian="ES" style:font-weight-asian="bold" style:font-name-complex="Arial1" style:font-weight-complex="bold"/>
    </style:style>
    <style:style style:name="T2" style:family="text">
      <style:text-properties fo:font-variant="normal" fo:text-transform="none" fo:font-style="normal"/>
    </style:style>
    <style:style style:name="T3" style:family="text">
      <style:text-properties fo:language="es" fo:country="ES" fo:font-weight="bold" officeooo:rsid="00125a34" style:language-asian="es" style:country-asian="ES" style:font-weight-asian="bold" style:font-name-complex="Arial1" style:font-weight-complex="bold"/>
    </style:style>
    <style:style style:name="T4" style:family="text">
      <style:text-properties fo:color="#212529" loext:opacity="100%" fo:font-weight="bold" style:font-weight-asian="bold" style:font-name-complex="Arial1" style:font-weight-complex="bold"/>
    </style:style>
    <style:style style:name="T5" style:family="text">
      <style:text-properties fo:font-weight="bold" style:font-weight-asian="bold" style:font-name-complex="Arial1" style:font-weight-complex="bold"/>
    </style:style>
    <style:style style:name="T6" style:family="text">
      <style:text-properties fo:font-weight="bold" style:font-name-asian="Times New Roman1" style:language-asian="es" style:country-asian="AR" style:font-weight-asian="bold" style:font-name-complex="Arial1" style:font-weight-complex="bold"/>
    </style:style>
    <style:style style:name="T7" style:family="text">
      <style:text-properties fo:color="#212529" loext:opacity="100%" fo:font-weight="bold" style:font-weight-asian="bold" style:font-weight-complex="bold"/>
    </style:style>
    <style:style style:name="T8" style:family="text">
      <style:text-properties fo:language="es" fo:country="ES" fo:font-weight="bold" officeooo:rsid="0019c332" style:font-name-asian="Times New Roman1" style:language-asian="es" style:country-asian="ES" style:font-weight-asian="bold" style:font-name-complex="Arial1" style:font-weight-complex="bold"/>
    </style:style>
    <style:style style:name="T9" style:family="text">
      <style:text-properties fo:language="es" fo:country="ES" fo:font-weight="bold" style:font-name-asian="Times New Roman1" style:language-asian="es" style:country-asian="ES" style:font-weight-asian="bold" style:font-name-complex="Arial1" style:font-weight-complex="bold"/>
    </style:style>
    <style:style style:name="T10" style:family="text">
      <style:text-properties fo:font-variant="normal" fo:text-transform="none" fo:language="es" fo:country="ES" fo:font-style="normal" fo:font-weight="bold" style:font-name-asian="Times New Roman1" style:language-asian="es" style:country-asian="ES" style:font-weight-asian="bold" style:font-name-complex="Arial1"/>
    </style:style>
    <style:style style:name="T11" style:family="text">
      <style:text-properties fo:language="es" fo:country="ES" fo:font-weight="bold" officeooo:rsid="00125a34" style:font-name-asian="Times New Roman1" style:language-asian="es" style:country-asian="ES" style:font-weight-asian="bold" style:font-name-complex="Arial1" style:font-weight-complex="bold"/>
    </style:style>
    <style:style style:name="T12" style:family="text">
      <style:text-properties fo:color="#ff0000" loext:opacity="100%" fo:language="es" fo:country="ES" fo:font-weight="bold" style:font-name-asian="Times New Roman1" style:language-asian="es" style:country-asian="ES" style:font-weight-asian="bold" style:font-name-complex="Arial1" style:font-weight-complex="bold"/>
    </style:style>
    <style:style style:name="T13" style:family="text">
      <style:text-properties fo:color="#ff0000" loext:opacity="100%" fo:font-weight="bold" style:language-asian="es" style:country-asian="ES" style:font-weight-asian="bold" style:font-name-complex="Arial1"/>
    </style:style>
    <style:style style:name="T14" style:family="text">
      <style:text-properties fo:color="#ff0000" loext:opacity="100%" fo:font-weight="bold" officeooo:rsid="00164227" style:language-asian="es" style:country-asian="ES" style:font-weight-asian="bold" style:font-name-complex="Arial1"/>
    </style:style>
    <style:style style:name="T15" style:family="text">
      <style:text-properties fo:font-weight="bold" style:language-asian="es" style:country-asian="ES" style:font-weight-asian="bold" style:font-name-complex="Arial1"/>
    </style:style>
    <style:style style:name="T16" style:family="text">
      <style:text-properties style:language-asian="es" style:country-asian="ES" style:font-name-complex="Arial1"/>
    </style:style>
    <style:style style:name="T17" style:family="text">
      <style:text-properties officeooo:rsid="00125a34" style:language-asian="es" style:country-asian="ES" style:font-name-complex="Arial1"/>
    </style:style>
    <style:style style:name="T18" style:family="text">
      <style:text-properties officeooo:rsid="0017e1f0" style:language-asian="es" style:country-asian="ES" style:font-name-complex="Arial1"/>
    </style:style>
    <style:style style:name="T19" style:family="text">
      <style:text-properties fo:color="#ff0000" loext:opacity="100%" style:language-asian="es" style:country-asian="ES" style:font-name-complex="Arial1"/>
    </style:style>
    <style:style style:name="T20" style:family="text">
      <style:text-properties fo:color="#ff0000" loext:opacity="100%" officeooo:rsid="0017e1f0" style:language-asian="es" style:country-asian="ES" style:font-name-complex="Arial1"/>
    </style:style>
    <style:style style:name="T21" style:family="text">
      <style:text-properties fo:color="#ff0000" loext:opacity="100%" style:font-name-complex="Arial1"/>
    </style:style>
    <style:style style:name="T22" style:family="text">
      <style:text-properties fo:font-weight="bold" style:language-asian="es" style:country-asian="ES" style:font-weight-asian="bold" style:font-name-complex="Arial1" style:font-weight-complex="bold"/>
    </style:style>
    <style:style style:name="T23" style:family="text">
      <style:text-properties fo:font-variant="normal" fo:text-transform="none" fo:font-style="normal" fo:font-weight="bold" style:language-asian="es" style:country-asian="ES" style:font-weight-asian="bold" style:font-name-complex="Arial1" style:font-weight-complex="bold"/>
    </style:style>
    <style:style style:name="T24" style:family="text">
      <style:text-properties fo:color="#212529" loext:opacity="100%" fo:font-weight="bold" style:language-asian="es" style:country-asian="ES" style:font-weight-asian="bold" style:font-name-complex="Arial1" style:font-weight-complex="bold"/>
    </style:style>
    <style:style style:name="T25" style:family="text">
      <style:text-properties style:font-name-complex="Arial1"/>
    </style:style>
    <style:style style:name="T26" style:family="text">
      <style:text-properties style:language-asian="es" style:country-asian="ES" style:font-name-complex="Arial1" style:font-weight-complex="bold"/>
    </style:style>
    <style:style style:name="T27" style:family="text">
      <style:text-properties style:font-name-asian="Times New Roman1" style:language-asian="es" style:country-asian="ES" style:font-name-complex="Arial1"/>
    </style:style>
    <style:style style:name="T28" style:family="text">
      <style:text-properties fo:language="es" fo:country="ES" style:font-name-asian="Times New Roman1" style:language-asian="es" style:country-asian="ES" style:font-name-complex="Arial1"/>
    </style:style>
    <style:style style:name="T29" style:family="text">
      <style:text-properties fo:language="es" fo:country="ES" officeooo:rsid="001466a2" style:font-name-asian="Times New Roman1" style:language-asian="es" style:country-asian="ES" style:font-name-complex="Arial1"/>
    </style:style>
    <style:style style:name="T30" style:family="text">
      <style:text-properties fo:language="es" fo:country="ES" fo:font-weight="bold" style:font-weight-asian="bold" style:font-name-complex="Arial1" style:font-weight-complex="bold"/>
    </style:style>
    <style:style style:name="T31" style:family="text">
      <style:text-properties fo:language="es" fo:country="ES" fo:font-weight="bold" officeooo:rsid="001996bf" style:font-weight-asian="bold" style:font-name-complex="Arial1" style:font-weight-complex="bold"/>
    </style:style>
    <style:style style:name="T32" style:family="text">
      <style:text-properties fo:language="es" fo:country="ES" style:font-name-complex="Arial1"/>
    </style:style>
    <style:style style:name="T33" style:family="text">
      <style:text-properties fo:color="#ee0000" loext:opacity="100%" style:font-name-complex="Arial1"/>
    </style:style>
    <style:style style:name="T34" style:family="text">
      <style:text-properties officeooo:rsid="00162698" style:language-asian="es" style:country-asian="ES" style:font-name-complex="Arial1"/>
    </style:style>
    <style:style style:name="T35" style:family="text">
      <style:text-properties fo:color="#ff0000" loext:opacity="100%" officeooo:rsid="00162698" style:language-asian="es" style:country-asian="ES" style:font-name-complex="Arial1"/>
    </style:style>
    <style:style style:name="T36" style:family="text">
      <style:text-properties fo:language="es" fo:country="ES" style:language-asian="es" style:country-asian="ES" style:font-name-complex="Arial1"/>
    </style:style>
    <style:style style:name="T37" style:family="text">
      <style:text-properties fo:language="es" fo:country="ES" officeooo:rsid="00164227" style:language-asian="es" style:country-asian="ES" style:font-name-complex="Arial1"/>
    </style:style>
    <style:style style:name="T38" style:family="text">
      <style:text-properties fo:font-variant="normal" fo:text-transform="none" fo:language="es" fo:country="ES" fo:font-style="normal" fo:font-weight="bold" style:language-asian="es" style:country-asian="ES" style:font-weight-asian="bold" style:font-name-complex="Arial1" style:font-weight-complex="bold"/>
    </style:style>
    <style:style style:name="T39" style:family="text">
      <style:text-properties fo:language="es" fo:country="ES" fo:font-weight="bold" style:font-name-asian="Times New Roman1" style:language-asian="es" style:country-asian="AR" style:font-weight-asian="bold" style:font-name-complex="Arial1" style:font-weight-complex="bold"/>
    </style:style>
    <style:style style:name="T40" style:family="text">
      <style:text-properties fo:color="#212529" loext:opacity="100%" fo:language="es" fo:country="ES" fo:font-weight="bold" style:language-asian="es" style:country-asian="ES" style:font-weight-asian="bold" style:font-name-complex="Arial1" style:font-weight-complex="bold"/>
    </style:style>
    <style:style style:name="T41" style:family="text">
      <style:text-properties fo:color="#ff0000" loext:opacity="100%" fo:language="es" fo:country="ES" style:language-asian="es" style:country-asian="ES" style:font-name-complex="Arial1"/>
    </style:style>
    <style:style style:name="T42" style:family="text">
      <style:text-properties style:font-name="Arial" fo:font-size="9pt" style:font-size-asian="9pt" style:font-name-complex="Arial1" style:font-size-complex="9pt"/>
    </style:style>
    <style:style style:name="T43" style:family="text">
      <style:text-properties style:font-name="Times New Roman" fo:font-size="10pt" style:font-size-asian="10pt" style:font-size-complex="10pt"/>
    </style:style>
    <style:style style:name="T44" style:family="text">
      <style:text-properties style:font-name="Times New Roman" fo:font-size="10pt" officeooo:rsid="00164227" style:font-size-asian="10pt" style:font-size-complex="10pt"/>
    </style:style>
    <style:style style:name="T45" style:family="text">
      <style:text-properties style:font-name="Times New Roman" fo:font-size="10pt" officeooo:rsid="0017d86f" style:font-size-asian="10pt" style:font-size-complex="10pt"/>
    </style:style>
    <style:style style:name="T46" style:family="text">
      <style:text-properties fo:font-variant="normal" fo:text-transform="none" fo:color="#1f1f1f" loext:opacity="100%" fo:font-family="'Google Sans', Roboto, RobotoDraft, Helvetica, Arial, sans-serif" fo:font-size="10.5pt" fo:letter-spacing="normal" fo:font-style="normal" fo:font-weight="bold"/>
    </style:style>
    <style:style style:name="T47" style:family="text">
      <style:text-properties fo:font-size="10pt" style:font-size-asian="10pt" style:font-size-complex="10pt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1.679cm" fo:min-width="8.37cm" fo:padding-top="0.127cm" fo:padding-bottom="0.127cm" fo:padding-left="0.254cm" fo:padding-right="0.254cm" fo:wrap-option="wrap" loext:decorative="false" fo:margin-left="0cm" fo:margin-right="0.014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A N° <text:s text:c="2"/>«</text:span><text:span text:style-name="T2">ACTA N°</text:span><text:span text:style-name="T3">»</text:span><text:span text:style-name="T1"> <text:s/>/ «</text:span><text:span text:style-name="T3">año actual»</text:span><text:span text:style-name="T1"> C.C. - Sanción Disciplinaria</text:span><text:span text:style-name="T4"> /</text:span><text:span text:style-name="T5"> Interno «</text:span><text:span text:style-name="T2">INTERNO</text:span><text:span text:style-name="T5">»</text:span><text:span text:style-name="T6"> </text:span><text:span text:style-name="T5">(L.P.U.</text:span><text:span text:style-name="T7"> «</text:span><text:span text:style-name="T2">LPU</text:span> <text:span text:style-name="T7">»</text:span><text:span text:style-name="T5">)</text:span></text:p>
      <text:p text:style-name="P2"/>
      <text:p text:style-name="P3"><text:span text:style-name="T8">ACTA </text:span><text:span text:style-name="T9">«</text:span><text:span text:style-name="T10">ACTA N°</text:span><text:span text:style-name="T11">»</text:span><text:span text:style-name="T9"> <text:s/>/ «</text:span><text:span text:style-name="T11">año actual»</text:span><text:span text:style-name="T9"> </text:span><text:span text:style-name="T12">C.C</text:span><text:span text:style-name="T9">.</text:span></text:p>
      <text:p text:style-name="P3"><text:span text:style-name="T13">CONSEJO CORRECCIONAL / </text:span><text:span text:style-name="T14">CENTRO DE EVALUACIÓN DE INTERNOS PROCESADOS</text:span><text:span text:style-name="T15"> DEL INSTITUTO FEDERAL DE VARONES - C.P.F. III – NOA</text:span></text:p>
      <text:p text:style-name="P4"><text:span text:style-name="T16">En el Instituto Federal de Varones del Complejo Penitenciario Federal III “Centro Federal Noroeste Argentino” dependiente del Servicio Penitenciario Federal a los «</text:span><text:span text:style-name="T17">fecha actual en el formato “20 días del </text:span><text:span text:style-name="T18">mes de </text:span><text:span text:style-name="T17">Julio del año 2026”</text:span><text:span text:style-name="T16">», se procede a labrar la presente al sólo efecto de dejar constancia de la reunión efectuada por el </text:span><text:span text:style-name="T19">Consejo Correccional, presidida por el señor Director del Instituto, </text:span><text:span text:style-name="T20">el</text:span><text:span text:style-name="T19"> Alcaide Mayor Diego E TURIANO </text:span><text:span text:style-name="T21">e integrada por los Jefes de cada una de las áreas relativas a la aplicación del tratamiento penitenciario y/o sus representantes directos, actuando como Secretario Adjutor Ppal Lic Sergio GARCIA</text:span><text:span text:style-name="T16">; a fin de tratar la </text:span><text:span text:style-name="T22">SANCIÓN DISCIPLINARIA</text:span><text:span text:style-name="T16"> tramita por expediente electrónico </text:span><text:span text:style-name="T17">N.º «</text:span><text:span text:style-name="T2">EXPEDIENTE</text:span><text:span text:style-name="T17">»</text:span><text:span text:style-name="T16"> impuesta al interno </text:span><text:span text:style-name="T22">«</text:span><text:span text:style-name="T23">INTERNO</text:span><text:span text:style-name="T22">»</text:span><text:span text:style-name="T6"> </text:span><text:span text:style-name="T22">(L.P.U.</text:span><text:span text:style-name="T24"> «</text:span><text:span text:style-name="T23">LPU</text:span><text:span text:style-name="T24">»</text:span><text:span text:style-name="T22">)</text:span><text:span text:style-name="T25"> </text:span><text:span text:style-name="T16">a raíz de los hechos ocurridos el día «</text:span><text:span text:style-name="T2">FECHA DEL HECHO</text:span><text:span text:style-name="T16">»:</text:span><text:span text:style-name="T19"> </text:span><text:span text:style-name="T16">“</text:span><text:span text:style-name="T22">«</text:span><text:span text:style-name="T2">DESCRIPCION DEL HECHO</text:span> <text:span text:style-name="T22">»</text:span><text:span text:style-name="T16">”; <text:s/>transgrediendo de esta forma <text:s/>el «</text:span><text:span text:style-name="T2">ARTICULOS</text:span><text:span text:style-name="T16">»</text:span><text:span text:style-name="T26">;</text:span><text:span text:style-name="T16"> Infracciones tipificadas como </text:span><text:span text:style-name="T22">«</text:span><text:span text:style-name="T2">TIPO</text:span><text:span text:style-name="T22">»</text:span><text:span text:style-name="T16">, respectivamente. Por las mismas, mediante Orden Interna «</text:span><text:span text:style-name="T2">ORDEN INTERNA</text:span><text:span text:style-name="T16">»</text:span><text:span text:style-name="T27"> </text:span><text:span text:style-name="T16">de fecha </text:span><text:span text:style-name="T27">«</text:span><text:span text:style-name="T2">FECHA ORDEN INTERNA</text:span><text:span text:style-name="T27">»</text:span><text:span text:style-name="T16">, se le impuso el correctivo disciplinario contemplado en el «</text:span><text:span text:style-name="T2">SANCION</text:span><text:span text:style-name="T16">» del decreto 18/97.</text:span></text:p>
      <text:p text:style-name="P5"><text:span text:style-name="T28">Según lo informado por l</text:span><text:span text:style-name="T29">a División </text:span><text:span text:style-name="T28">Servicio Criminológico, e</text:span><text:span text:style-name="T27">l interno que nos ocupa registra actualmente guarismo de </text:span><text:span text:style-name="T30">C</text:span><text:span text:style-name="T31">onducta</text:span><text:span text:style-name="T30"> «</text:span><text:span text:style-name="T2">CONDUCTA INICIO</text:span> <text:span text:style-name="T30">» y Concepto «</text:span><text:span text:style-name="T2">CONCEPTO INICIO</text:span> <text:span text:style-name="T30">» </text:span><text:span text:style-name="T32">Transita la fase de «</text:span><text:span text:style-name="T2">FASE INICIO</text:span> <text:span text:style-name="T32">»</text:span><text:span text:style-name="T33">.</text:span></text:p>
      <text:p text:style-name="P6"><text:span text:style-name="T16">Previo a ponderar la falta, las circunstancias y la personalidad de la P</text:span><text:span text:style-name="T34">ersona </text:span><text:span text:style-name="T16">P</text:span><text:span text:style-name="T34">rivada de </text:span><text:span text:style-name="T16">L</text:span><text:span text:style-name="T34">ibertad</text:span><text:span text:style-name="T16"> y en concordancia con lo establecido en el artículo 59 del decreto 396/99 (Reglamento de Modalidades Básicas de Ejecución), los integrantes del </text:span><text:span text:style-name="T19">Consejo </text:span><text:span text:style-name="T35">C</text:span><text:span text:style-name="T19">orreccional,</text:span><text:span text:style-name="T16"> arriban a la CONCLUSIÓN, por consenso de criterios, de DISMINUIR «</text:span><text:span text:style-name="T2">CRITERIO CONDUCTA</text:span><text:span text:style-name="T16">» PUNTOS en el guarismo de CONDUCTA del interno </text:span><text:span text:style-name="T22">«</text:span><text:span text:style-name="T23">INTERNO</text:span><text:span text:style-name="T22">»</text:span><text:span text:style-name="T6"> </text:span><text:span text:style-name="T22">(L.P.U.</text:span><text:span text:style-name="T24"> «</text:span><text:span text:style-name="T23">LPU</text:span><text:span text:style-name="T24">»</text:span><text:span text:style-name="T22">)</text:span><text:span text:style-name="T25"> </text:span><text:span text:style-name="T16">quedando calificado en el día de la fecha con </text:span><text:span text:style-name="T30">Conducta «</text:span><text:span text:style-name="T2">CONDUCTA FINALIZA</text:span><text:span text:style-name="T30">» y Concepto «</text:span><text:span text:style-name="T2">CONCEPTO FINALIZA</text:span><text:span text:style-name="T30">». </text:span></text:p>
      <text:p text:style-name="P7"/>
      <text:p text:style-name="P8">No siendo para más, se da por finalizada la presente firmando al pie los integrantes del Centro de Evaluación de Internos Procesados, para las debidas constancias.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0">ACTA DE NOTIFICACIÓN DE SANCIÓN</text:p>
      <text:p text:style-name="P11"><text:span text:style-name="T16">-----</text:span><text:span text:style-name="T36">En el C.P.F. III N.O.A., Instituto Federal de Varones, a los <text:s text:c="6"/>días del mes de «</text:span><text:span text:style-name="T37">mes actual»</text:span><text:span text:style-name="T36"> del año «</text:span><text:span text:style-name="T37">año actual</text:span><text:span text:style-name="T36">», se procede a notificar al interno </text:span><text:span text:style-name="T1">«</text:span><text:span text:style-name="T38">INTERNO</text:span><text:span text:style-name="T1">»</text:span><text:span text:style-name="T39"> </text:span><text:span text:style-name="T1">(L.P.U.</text:span><text:span text:style-name="T40"> «</text:span><text:span text:style-name="T38">LPU</text:span><text:span text:style-name="T40">»</text:span><text:span text:style-name="T1">),</text:span><text:span text:style-name="T25"> </text:span><text:span text:style-name="T36">de lo resuelto por el </text:span><text:span text:style-name="T41">Consejo Correccional</text:span><text:span text:style-name="T36"> mediante Acta Nº <text:s/>«</text:span><text:span text:style-name="T2">ACTA N°</text:span><text:span text:style-name="T36">» de fecha <text:s text:c="2"/></text:span><text:span text:style-name="T41">20/05/2026</text:span><text:span text:style-name="T36">, por falta disciplinaria «</text:span><text:span text:style-name="T2">TIPO</text:span><text:span text:style-name="T36">» tramitada </text:span><text:span text:style-name="T37">mediante expediente «</text:span><text:span text:style-name="T2">EXPEDIENTE</text:span> <text:span text:style-name="T37">»</text:span><text:span text:style-name="T36"> </text:span><text:span text:style-name="T37">por echo ocurrido en </text:span><text:span text:style-name="T36">fecha «</text:span><text:span text:style-name="T2">FECHA DEL HECHO</text:span> <text:span text:style-name="T36">», </text:span><text:span text:style-name="T37">donde se le atribuye </text:span><text:span text:style-name="T36">el cargo de “</text:span><text:span text:style-name="T1">«</text:span><text:span text:style-name="T2">DESCRIPCION DEL HECHO</text:span><text:span text:style-name="T1">»</text:span><text:span text:style-name="T16">”. </text:span><text:span text:style-name="T36">Se dictaminó que por el hecho acaecido correspondería </text:span><text:span text:style-name="T16">DISMINUIR «</text:span><text:span text:style-name="T2">CRITERIO CONDUCTA</text:span><text:span text:style-name="T16">» PUNTOS en el guarismo de CONDUCTA del interno </text:span><text:span text:style-name="T22">«</text:span><text:span text:style-name="T23">INTERNO</text:span><text:span text:style-name="T22">»</text:span><text:span text:style-name="T6"> </text:span><text:span text:style-name="T22">(L.P.U.</text:span><text:span text:style-name="T24"> «</text:span><text:span text:style-name="T23">LPU</text:span><text:span text:style-name="T24">»</text:span><text:span text:style-name="T22">)</text:span><text:span text:style-name="T25"> </text:span><text:span text:style-name="T16">quedando calificado en el día de la fecha con </text:span><text:span text:style-name="T30">Conducta «</text:span><text:span text:style-name="T2">CONDUCTA FINALIZA</text:span><text:span text:style-name="T30">» y Concepto «</text:span><text:span text:style-name="T2">CONCEPTO FINALIZA</text:span><text:span text:style-name="T30">». </text:span><text:span text:style-name="T32">Se deja constancia que el próximo trimestre calificatorio se evaluará la disminución de su guarismo conceptual en virtud de los incidentes disciplinarios que anteceden.</text:span></text:p>
      <text:p text:style-name="P12"/>
      <text:p text:style-name="P13">-----No siendo por más, se da por finalizado el acto, rubricando el interno junto al suscripto que certifica. -</text:p>
      <text:p text:style-name="P14"/>
      <text:p text:style-name="P15"><draw:custom-shape text:anchor-type="char" draw:z-index="0" draw:name="Cuadro de texto 17" draw:style-name="gr1" draw:text-style-name="P19" svg:width="8.877cm" svg:height="1.932cm" svg:x="8.324cm" svg:y="0.222cm"><text:p text:style-name="P16" loext:marker-style-name="T42">----------------------------------------</text:p><text:p text:style-name="P17" loext:marker-style-name="T42"><text:span text:style-name="T43">«</text:span><text:span text:style-name="T44">es el valor que existe en el rango D3 </text:span><text:span text:style-name="T45">de la hoja </text:span><text:span text:style-name="T46">Configuracion</text:span> <text:span text:style-name="T43">»</text:span></text:p><text:p text:style-name="P18" loext:marker-style-name="T42"><text:span text:style-name="T42">SECRETARIO DEL CONSEJO CORRECCIONAL</text:span></text:p><text:p text:style-name="P18" loext:marker-style-name="T47"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><text:s text:c="5"/>--------------------------------------------------</text:p>
      <text:p text:style-name="P20"><text:s text:c="30"/>INTERNO </text:p>
      <text:p text:style-name="P21"/>
      <text:p text:style-name="P10"/>
      <text:p text:style-name="P10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s" fo:country="AR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es" fo:country="AR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style:writing-mode="lr-tb"/>
      <style:text-properties fo:font-size="11pt" style:letter-kerning="false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635cm" fo:margin-bottom="0.141cm" style:contextual-spacing="false" fo:line-height="116%" fo:keep-together="always" fo:keep-with-next="always"/>
      <style:text-properties fo:color="#0f4761" loext:opacity="100%" style:font-name="Aptos Display" fo:font-family="'Aptos Display'" style:font-family-generic="roman" style:font-pitch="variable" fo:font-size="20pt" style:letter-kerning="true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282cm" fo:margin-bottom="0.141cm" style:contextual-spacing="false" fo:line-height="116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letter-kerning="true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282cm" fo:margin-bottom="0.141cm" style:contextual-spacing="false" fo:line-height="116%" fo:keep-together="always" fo:keep-with-next="always"/>
      <style:text-properties fo:color="#0f4761" loext:opacity="100%" fo:font-size="14pt" style:letter-kerning="true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top="0.141cm" fo:margin-bottom="0.071cm" style:contextual-spacing="false" fo:line-height="116%" fo:keep-together="always" fo:keep-with-next="always"/>
      <style:text-properties fo:color="#0f4761" loext:opacity="100%" fo:font-size="12pt" fo:font-style="italic" style:letter-kerning="true" style:font-name-asian="Aptos1" style:font-family-asian="Aptos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top="0.141cm" fo:margin-bottom="0.071cm" style:contextual-spacing="false" fo:line-height="116%" fo:keep-together="always" fo:keep-with-next="always"/>
      <style:text-properties fo:color="#0f4761" loext:opacity="100%" fo:font-size="12pt" style:letter-kerning="true" style:font-name-asian="Aptos1" style:font-family-asian="Aptos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chapter">
      <style:paragraph-properties fo:margin-top="0.071cm" fo:margin-bottom="0cm" style:contextual-spacing="false" fo:line-height="116%" fo:keep-together="always" fo:keep-with-next="always"/>
      <style:text-properties fo:color="#595959" loext:opacity="100%" fo:font-size="12pt" fo:font-style="italic" style:letter-kerning="true" style:font-name-asian="Aptos1" style:font-family-asian="Aptos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chapter">
      <style:paragraph-properties fo:margin-top="0.071cm" fo:margin-bottom="0cm" style:contextual-spacing="false" fo:line-height="116%" fo:keep-together="always" fo:keep-with-next="always"/>
      <style:text-properties fo:color="#595959" loext:opacity="100%" fo:font-size="12pt" style:letter-kerning="true" style:font-name-asian="Aptos1" style:font-family-asian="Aptos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chapter">
      <style:paragraph-properties fo:margin-top="0cm" fo:margin-bottom="0cm" style:contextual-spacing="false" fo:line-height="116%" fo:keep-together="always" fo:keep-with-next="always"/>
      <style:text-properties fo:color="#272727" loext:opacity="100%" fo:font-size="12pt" fo:font-style="italic" style:letter-kerning="true" style:font-name-asian="Aptos1" style:font-family-asian="Aptos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chapter">
      <style:paragraph-properties fo:margin-top="0cm" fo:margin-bottom="0cm" style:contextual-spacing="false" fo:line-height="116%" fo:keep-together="always" fo:keep-with-next="always"/>
      <style:text-properties fo:color="#272727" loext:opacity="100%" fo:font-size="12pt" style:letter-kerning="true" style:font-name-asian="Aptos1" style:font-family-asian="Aptos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paragraph-properties fo:margin-top="0cm" fo:margin-bottom="0.282cm" style:contextual-spacing="false" fo:line-height="116%"/>
      <style:text-properties fo:color="#595959" loext:opacity="100%" fo:font-size="14pt" fo:letter-spacing="0.026cm" style:letter-kerning="true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line-height="116%" fo:text-align="center" style:justify-single-word="false"/>
      <style:text-properties fo:color="#404040" loext:opacity="100%" fo:font-size="12pt" fo:font-style="italic" style:letter-kerning="true" style:font-size-asian="12pt" style:font-style-asian="italic" style:font-size-complex="12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16%"/>
      <style:text-properties fo:font-size="12pt" style:letter-kerning="true" style:font-size-asian="12pt" style:font-size-complex="12pt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line-height="116%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ize="12pt" fo:font-style="italic" style:letter-kerning="true" style:font-size-asian="12pt" style:font-style-asian="italic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6</meta:editing-cycles>
    <meta:creation-date>2026-07-01T12:09:34.698960600</meta:creation-date>
    <meta:editing-duration>PT8M40S</meta:editing-duration>
    <meta:generator>LibreOffice/26.2.4.2$Windows_X86_64 LibreOffice_project/0229ac93fcf0d7cbc6376066c6f35021cef002dc</meta:generator>
    <dc:date>2026-07-01T12:53:07.107815300</dc:date>
    <meta:document-statistic meta:table-count="0" meta:image-count="0" meta:object-count="0" meta:page-count="2" meta:paragraph-count="15" meta:word-count="532" meta:character-count="3547" meta:non-whitespace-character-count="2979"/>
    <meta:user-defined meta:name="AppVersion">16.0000</meta:user-defined>
  </office:meta>
</office:document-meta>
</file>